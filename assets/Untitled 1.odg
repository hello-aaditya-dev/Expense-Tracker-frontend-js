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 fo:min-height="9.275cm" fo:min-width="3.627cm" loext:decorative="false"/>
    </style:style>
    <style:style style:name="gr2" style:family="graphic" style:parent-style-name="standard">
      <style:graphic-properties draw:fill-color="#780373" draw:textarea-horizontal-align="justify" draw:textarea-vertical-align="middle" draw:auto-grow-height="false" fo:min-height="1.338cm" fo:min-width="3.627cm" loext:decorative="false"/>
    </style:style>
    <style:style style:name="gr3" style:family="graphic" style:parent-style-name="standard">
      <style:graphic-properties draw:fill-color="#5eb91e" draw:textarea-horizontal-align="justify" draw:textarea-vertical-align="middle" draw:auto-grow-height="false" fo:min-height="0.703cm" fo:min-width="2.357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standard">
      <style:graphic-properties draw:fill-color="#780373" draw:textarea-horizontal-align="justify" draw:textarea-vertical-align="middle" draw:auto-grow-height="false" fo:min-height="0.385cm" fo:min-width="3.578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780373" draw:textarea-horizontal-align="justify" draw:textarea-vertical-align="middle" draw:auto-grow-height="false" fo:min-height="0.385cm" fo:min-width="0.453cm" loext:decorative="false"/>
    </style:style>
    <style:style style:name="gr7" style:family="graphic" style:parent-style-name="standard">
      <style:graphic-properties draw:textarea-vertical-align="middle" draw:auto-grow-height="false" fo:min-height="0.133cm" fo:min-width="0cm" fo:wrap-option="wrap" loext:decorative="false"/>
    </style:style>
    <style:style style:name="gr8" style:family="graphic" style:parent-style-name="standard">
      <style:graphic-properties draw:fill-color="#780373" draw:textarea-horizontal-align="justify" draw:textarea-vertical-align="middle" draw:auto-grow-height="false" fo:min-height="0.385cm" fo:min-width="0.452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306cm" fo:min-width="0cm" loext:decorative="false"/>
    </style:style>
    <style:style style:name="gr10" style:family="graphic" style:parent-style-name="standard">
      <style:graphic-properties draw:fill-color="#780373" draw:textarea-horizontal-align="justify" draw:textarea-vertical-align="middle" draw:auto-grow-height="false" fo:min-height="4.513cm" fo:min-width="9.66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780373" draw:textarea-horizontal-align="justify" draw:textarea-vertical-align="middle" draw:auto-grow-height="false" fo:min-height="3.878cm" fo:min-width="9.66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fill-color="#780373" draw:textarea-horizontal-align="justify" draw:textarea-vertical-align="middle" draw:auto-grow-height="false" fo:min-height="4.195cm" fo:min-width="2.993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780373" draw:textarea-horizontal-align="justify" draw:textarea-vertical-align="middle" draw:auto-grow-height="false" fo:min-height="0.385cm" fo:min-width="1.722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780373" draw:textarea-horizontal-align="justify" draw:textarea-vertical-align="middle" draw:auto-grow-height="false" fo:min-height="3.878cm" fo:min-width="2.675cm" style:writing-mode="lr-tb" loext:decorative="false"/>
      <style:paragraph-properties style:writing-mode="lr-tb"/>
    </style:style>
    <style:style style:name="P1" style:family="paragraph">
      <loext:graphic-properties draw:fill-color="#3465a4"/>
      <style:paragraph-properties fo:text-align="center"/>
    </style:style>
    <style:style style:name="P2" style:family="paragraph">
      <loext:graphic-properties draw:fill-color="#780373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5eb91e"/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780373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780373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27cm" svg:height="9.525cm" svg:x="1.635cm" svg:y="10.2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27cm" svg:height="1.588cm" svg:x="1.635cm" svg:y="10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27cm" svg:height="1.588cm" svg:x="1.635cm" svg:y="12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27cm" svg:height="1.588cm" svg:x="1.635cm" svg:y="14.3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27cm" svg:height="1.588cm" svg:x="1.635cm" svg:y="16.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857cm" svg:height="0.953cm" svg:x="2.27cm" svg:y="18.462cm">
          <text:p text:style-name="P3">Add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175cm" svg:height="1.673cm" svg:x="1.952cm" svg:y="10.439cm">
          <draw:text-box>
            <text:p>Current Balance</text:p>
          </draw:text-box>
        </draw:frame>
        <draw:custom-shape draw:style-name="gr2" draw:text-style-name="P2" draw:layer="layout" svg:width="4.127cm" svg:height="1.588cm" svg:x="1.635cm" svg:y="16.2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175cm" svg:height="1.673cm" svg:x="1.952cm" svg:y="14.335cm">
          <draw:text-box>
            <text:p>Total Expense</text:p>
          </draw:text-box>
        </draw:frame>
        <draw:frame draw:style-name="gr4" draw:text-style-name="P5" draw:layer="layout" svg:width="3.175cm" svg:height="1.673cm" svg:x="1.952cm" svg:y="12.43cm">
          <draw:text-box>
            <text:p>Total Income</text:p>
          </draw:text-box>
        </draw:frame>
        <draw:frame draw:style-name="gr4" draw:text-style-name="P5" draw:layer="layout" svg:width="3.175cm" svg:height="1.673cm" svg:x="1.952cm" svg:y="16.24cm">
          <draw:text-box>
            <text:p>TotalTransactions</text:p>
          </draw:text-box>
        </draw:frame>
        <draw:custom-shape draw:style-name="gr5" draw:text-style-name="P6" draw:layer="layout" svg:width="4.078cm" svg:height="0.635cm" svg:x="1.635cm" svg:y="9.255cm">
          <text:p text:style-name="P3">Dash <text:s/>Seti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53cm" svg:height="0.635cm" svg:x="17.509cm" svg:y="9.2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17cm" svg:height="0.635cm" svg:x="17.824cm" svg:y="9.255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8" draw:text-style-name="P2" draw:layer="layout" svg:width="0.952cm" svg:height="0.635cm" svg:x="4.81cm" svg:y="17.8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52cm" svg:height="0.635cm" svg:x="18.78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318cm" svg:height="0.635cm" svg:x="19.097cm" svg:y="9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10.16cm" svg:height="4.763cm" svg:x="6.08cm" svg:y="10.207cm">
          <text:p text:style-name="P7"><text:span text:style-name="T1"><text:s/></text:span>Expenditure time wise graphical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0.16cm" svg:height="4.128cm" svg:x="6.08cm" svg:y="15.287cm">
          <text:p text:style-name="P3">All transactions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493cm" svg:height="4.445cm" svg:x="16.507cm" svg:y="14.652cm">
          <text:p text:style-name="P7"><text:span text:style-name="T1">Total expenditure graphical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.222cm" svg:height="0.635cm" svg:x="14.97cm" svg:y="9.255cm">
          <text:p text:style-name="P3">Name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175cm" svg:height="4.128cm" svg:x="16.557cm" svg:y="10.207cm">
          <text:p text:style-name="P3">Calend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8T23:40:39.096882690</meta:creation-date>
    <meta:editing-duration>PT7H44M27S</meta:editing-duration>
    <meta:editing-cycles>2</meta:editing-cycles>
    <meta:generator>LibreOffice/24.2.7.2$Linux_X86_64 LibreOffice_project/420$Build-2</meta:generator>
    <dc:date>2026-06-29T07:35:15.532469359</dc:date>
    <meta:document-statistic meta:object-count="22"/>
  </office:meta>
</office:document-meta>
</file>